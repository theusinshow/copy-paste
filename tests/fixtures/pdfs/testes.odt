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bd93f9" loext:opacity="100%" style:font-name="Consolas" fo:font-size="10.5pt" fo:font-weight="bold" fo:background-color="#282a36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Consolas" fo:font-size="10.5pt" fo:font-weight="normal" fo:background-color="#282a36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Consolas" fo:font-size="10.5pt" fo:font-weight="normal" fo:background-color="#282a36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f8f8f2" loext:opacity="100%" style:font-name="Consolas" fo:font-size="10.5pt" fo:font-weight="normal" fo:background-color="#282a36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50fa7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DF unico de teste geral</text:p>
      <text:p text:style-name="P2"/>
      <text:p text:style-name="P3">Este arquivo foi feito para ser exportado como um PDF maior e anexado sozinho na interface.</text:p>
      <text:p text:style-name="P2"/>
      <text:p text:style-name="P3">Objetivo:</text:p>
      <text:p text:style-name="P3">- validar se o sistema extrai varias ocorrencias de campos no mesmo PDF</text:p>
      <text:p text:style-name="P3">- provocar divergencias de <text:span text:style-name="T1">`nome_obra`</text:span>, <text:span text:style-name="T1">`numero_projeto`</text:span> e <text:span text:style-name="T1">`bairro`</text:span></text:p>
      <text:p text:style-name="P3">- verificar se a tela de resultado mostra issues e campos extraidos</text:p>
      <text:p text:style-name="P2"/>
      <text:p text:style-name="P3">Uso recomendado:</text:p>
      <text:p text:style-name="P3">1. Exporte este Markdown como PDF com texto nativo.</text:p>
      <text:p text:style-name="P3">2. Anexe apenas este PDF na tela inicial.</text:p>
      <text:p text:style-name="P3">3. Use o modo <text:span text:style-name="T1">`Analise completa`</text:span>.</text:p>
      <text:p text:style-name="P3">4. Informe o tipo como <text:span text:style-name="T1">`Tudo`</text:span> ou <text:span text:style-name="T1">`memorial`</text:span>.</text:p>
      <text:p text:style-name="P2"/>
      <text:p text:style-name="P3">Resultado esperado:</text:p>
      <text:p text:style-name="P3">- issue relevante para <text:span text:style-name="T1">`nome_obra_divergente`</text:span></text:p>
      <text:p text:style-name="P3">- issue relevante para <text:span text:style-name="T1">`numero_projeto_divergente`</text:span></text:p>
      <text:p text:style-name="P3">- issue relevante para <text:span text:style-name="T1">`bairro_divergente`</text:span></text:p>
      <text:p text:style-name="P3">- lista de campos extraidos preenchida</text:p>
      <text:p text:style-name="P2"/>
      <text:p text:style-name="P3">Observacao:</text:p>
      <text:p text:style-name="P3">- este arquivo mistura muitos cenarios de proposito</text:p>
      <text:p text:style-name="P3">- para testar um erro isolado, use <text:span text:style-name="T1">`TEST_CASES.md`</text:span></text:p>
      <text:p text:style-name="P2"/>
      <text:p text:style-name="P4">---</text:p>
      <text:p text:style-name="P2"/>
      <text:p text:style-name="P1">## Pagina 1 - Memorial correto</text:p>
      <text:p text:style-name="P2"/>
      <text:p text:style-name="P3">Documento: Memorial descritivo</text:p>
      <text:p text:style-name="P3">Tipo: memorial</text:p>
      <text:p text:style-name="P2"/>
      <text:p text:style-name="P3">Nome da obra: Travessia Vila Rica</text:p>
      <text:p text:style-name="P3">Numero do projeto: 101-25</text:p>
      <text:p text:style-name="P3">Bairro: Vila Rica</text:p>
      <text:p text:style-name="P3">Endereco da obra: Rua Ariovaldo Machado, 120</text:p>
      <text:p text:style-name="P3">Municipio: Criciuma</text:p>
      <text:p text:style-name="P3">Cliente: Municipio de Criciuma</text:p>
      <text:p text:style-name="P2"/>
      <text:p text:style-name="P3">Resumo:</text:p>
      <text:p text:style-name="P3">Este trecho representa o documento de referencia correto. Os demais blocos abaixo</text:p>
      <text:p text:style-name="P3">introduzem divergencias controladas para validar o rules engine.</text:p>
      <text:p text:style-name="P2"/>
      <text:p text:style-name="P4">---</text:p>
      <text:p text:style-name="P2"/>
      <text:p text:style-name="P1">## Pagina 2 - Prancha com numero divergente</text:p>
      <text:p text:style-name="P2"/>
      <text:p text:style-name="P3">Documento: Prancha tecnica</text:p>
      <text:p text:style-name="P3">Tipo: prancha</text:p>
      <text:p text:style-name="P2"/>
      <text:p text:style-name="P3"><text:soft-page-break/>Nome da obra: Travessia Vila Rica</text:p>
      <text:p text:style-name="P3">Numero do projeto: 101-26</text:p>
      <text:p text:style-name="P3">Bairro: Vila Rica</text:p>
      <text:p text:style-name="P3">Endereco da obra: Rua Ariovaldo Machado, 120</text:p>
      <text:p text:style-name="P3">Municipio: Criciuma</text:p>
      <text:p text:style-name="P3">Cliente: Municipio de Criciuma</text:p>
      <text:p text:style-name="P2"/>
      <text:p text:style-name="P3">Resumo:</text:p>
      <text:p text:style-name="P3">Este bloco deve gerar divergencia no numero do projeto quando comparado com a</text:p>
      <text:p text:style-name="P3">pagina 1.</text:p>
      <text:p text:style-name="P2"/>
      <text:p text:style-name="P4">---</text:p>
      <text:p text:style-name="P2"/>
      <text:p text:style-name="P1">## Pagina 3 - Prancha com bairro divergente</text:p>
      <text:p text:style-name="P2"/>
      <text:p text:style-name="P3">Documento: Prancha tecnica</text:p>
      <text:p text:style-name="P3">Tipo: prancha</text:p>
      <text:p text:style-name="P2"/>
      <text:p text:style-name="P3">Nome da obra: Travessia Vila Rica</text:p>
      <text:p text:style-name="P3">Numero do projeto: 101-25</text:p>
      <text:p text:style-name="P3">Bairro: Centro</text:p>
      <text:p text:style-name="P3">Endereco da obra: Rua Ariovaldo Machado, 120</text:p>
      <text:p text:style-name="P3">Municipio: Criciuma</text:p>
      <text:p text:style-name="P3">Cliente: Municipio de Criciuma</text:p>
      <text:p text:style-name="P2"/>
      <text:p text:style-name="P3">Resumo:</text:p>
      <text:p text:style-name="P3">Este bloco deve gerar divergencia no bairro quando comparado com a pagina 1.</text:p>
      <text:p text:style-name="P2"/>
      <text:p text:style-name="P4">---</text:p>
      <text:p text:style-name="P2"/>
      <text:p text:style-name="P1">## Pagina 4 - Memorial com nome da obra divergente</text:p>
      <text:p text:style-name="P2"/>
      <text:p text:style-name="P3">Documento: Memorial complementar</text:p>
      <text:p text:style-name="P3">Tipo: memorial</text:p>
      <text:p text:style-name="P2"/>
      <text:p text:style-name="P3">Nome da obra: Travessia Centro</text:p>
      <text:p text:style-name="P3">Numero do projeto: 101-25</text:p>
      <text:p text:style-name="P3">Bairro: Vila Rica</text:p>
      <text:p text:style-name="P3">Endereco da obra: Rua Ariovaldo Machado, 120</text:p>
      <text:p text:style-name="P3">Municipio: Criciuma</text:p>
      <text:p text:style-name="P3">Cliente: Municipio de Criciuma</text:p>
      <text:p text:style-name="P2"/>
      <text:p text:style-name="P3">Resumo:</text:p>
      <text:p text:style-name="P3">Este bloco deve gerar divergencia no nome da obra quando comparado com a pagina 1.</text:p>
      <text:p text:style-name="P2"/>
      <text:p text:style-name="P4">---</text:p>
      <text:p text:style-name="P2"/>
      <text:p text:style-name="P1">## Pagina 5 - Multiplas divergencias</text:p>
      <text:p text:style-name="P2"/>
      <text:p text:style-name="P3">Documento: Lista de desenhos</text:p>
      <text:p text:style-name="P3">Tipo: ld</text:p>
      <text:p text:style-name="P2"><text:soft-page-break/></text:p>
      <text:p text:style-name="P3">Nome da obra: Travessia Sao Luiz</text:p>
      <text:p text:style-name="P3">Numero do projeto: 999-99</text:p>
      <text:p text:style-name="P3">Bairro: Sao Luiz</text:p>
      <text:p text:style-name="P3">Endereco da obra: Rua XV de Novembro, 500</text:p>
      <text:p text:style-name="P3">Municipio: Criciuma</text:p>
      <text:p text:style-name="P3">Cliente: Municipio de Criciuma</text:p>
      <text:p text:style-name="P2"/>
      <text:p text:style-name="P3">Resumo:</text:p>
      <text:p text:style-name="P3">Este bloco deve reforcar as divergencias de nome da obra, numero do projeto e bairro.</text:p>
      <text:p text:style-name="P2"/>
      <text:p text:style-name="P4">---</text:p>
      <text:p text:style-name="P2"/>
      <text:p text:style-name="P1">## Pagina 6 - Campo ausente proposital</text:p>
      <text:p text:style-name="P2"/>
      <text:p text:style-name="P3">Documento: Prancha sem bairro</text:p>
      <text:p text:style-name="P3">Tipo: prancha</text:p>
      <text:p text:style-name="P2"/>
      <text:p text:style-name="P3">Nome da obra: Travessia Vila Rica</text:p>
      <text:p text:style-name="P3">Numero do projeto: 101-25</text:p>
      <text:p text:style-name="P3">Endereco da obra: Rua Ariovaldo Machado, 120</text:p>
      <text:p text:style-name="P3">Municipio: Criciuma</text:p>
      <text:p text:style-name="P3">Cliente: Municipio de Criciuma</text:p>
      <text:p text:style-name="P2"/>
      <text:p text:style-name="P3">Resumo:</text:p>
      <text:p text:style-name="P3">Este bloco nao possui <text:span text:style-name="T1">`Bairro`</text:span>. Como outros blocos possuem bairro, pode ajudar a</text:p>
      <text:p text:style-name="P3">validar a regra de campo obrigatorio ausente quando ela estiver ativa para este</text:p>
      <text:p text:style-name="P3">formato de documento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0:14:20.540724900</meta:creation-date>
    <meta:generator>LibreOffice/25.8.5.2$Windows_X86_64 LibreOffice_project/9c8b85f387cc00a89945a79c9e6239f32e450ac2</meta:generator>
    <meta:print-date>2026-04-24T10:20:12.771711800</meta:print-date>
    <meta:printed-by>Arquivos PDF</meta:printed-by>
    <dc:date>2026-04-24T10:21:41.707695100</dc:date>
    <meta:editing-duration>PT1M28S</meta:editing-duration>
    <meta:editing-cycles>1</meta:editing-cycles>
    <meta:document-statistic meta:table-count="0" meta:image-count="0" meta:object-count="0" meta:page-count="3" meta:paragraph-count="94" meta:word-count="477" meta:character-count="3002" meta:non-whitespace-character-count="2619"/>
  </office:meta>
</office:document-meta>
</file>